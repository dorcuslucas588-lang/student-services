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style="urn:oasis:names:tc:opendocument:xmlns:style:1.0" xmlns:text="urn:oasis:names:tc:opendocument:xmlns:text:1.0" xmlns:fo="urn:oasis:names:tc:opendocument:xmlns:xsl-fo-compatible:1.0" xmlns:svg="urn:oasis:names:tc:opendocument:xmlns:svg-compatible:1.0" xmlns:draw="urn:oasis:names:tc:opendocument:xmlns:drawing:1.0" xmlns:xlink="http://www.w3.org/1999/xlink" xmlns:oow="http://openoffice.org/2004/writer" xmlns:table="urn:oasis:names:tc:opendocument:xmlns:table:1.0" xmlns:office="urn:oasis:names:tc:opendocument:xmlns:office:1.0" xmlns:dc="http://purl.org/dc/elements/1.1/">
  <office:font-face-decls>
    <style:font-face style:name="Times New Roman" svg:font-family="Times New Roman"/>
    <style:font-face style:name="Arial" svg:font-family="Arial"/>
  </office:font-face-decls>
  <office:automatic-styles>
    <style:style style:name="S0" style:family="section">
      <style:section-properties/>
    </style:style>
    <text:list-style style:name="L0">
      <text:list-level-style-number text:level="1" text:style-name="T1" style:num-suffix="." style:num-format="1">
        <style:list-level-properties text:list-level-position-and-space-mode="label-alignment" text:space-before="0.2944in" text:min-label-width="0.1965in">
          <style:list-level-label-alignment fo:text-align="left" fo:text-indent="-0.1965in" fo:margin-left="0.491in" fo:line-height="100%" text:label-followed-by="listtab"/>
        </style:list-level-properties>
      </text:list-level-style-number>
      <text:list-level-style-number text:level="2" text:style-name="T1" style:num-suffix="." style:num-format="1">
        <style:list-level-properties text:list-level-position-and-space-mode="label-alignment" text:space-before="0.7854in" text:min-label-width="0.1965in">
          <style:list-level-label-alignment fo:text-align="left" fo:text-indent="-0.1965in" fo:margin-left="0.9819in" fo:line-height="100%" text:label-followed-by="listtab"/>
        </style:list-level-properties>
      </text:list-level-style-number>
      <text:list-level-style-number text:level="3" text:style-name="T1" style:num-suffix="." style:num-format="1">
        <style:list-level-properties text:list-level-position-and-space-mode="label-alignment" text:space-before="1.2764in" text:min-label-width="0.1965in">
          <style:list-level-label-alignment fo:text-align="left" fo:text-indent="-0.1965in" fo:margin-left="1.4729in" fo:line-height="100%" text:label-followed-by="listtab"/>
        </style:list-level-properties>
      </text:list-level-style-number>
      <text:list-level-style-number text:level="4" text:style-name="T1" style:num-suffix="." style:num-format="1">
        <style:list-level-properties text:list-level-position-and-space-mode="label-alignment" text:space-before="1.7674in" text:min-label-width="0.1965in">
          <style:list-level-label-alignment fo:text-align="left" fo:text-indent="-0.1965in" fo:margin-left="1.9639in" fo:line-height="100%" text:label-followed-by="listtab"/>
        </style:list-level-properties>
      </text:list-level-style-number>
      <text:list-level-style-number text:level="5" text:style-name="T1" style:num-suffix="." style:num-format="1">
        <style:list-level-properties text:list-level-position-and-space-mode="label-alignment" text:space-before="2.2583in" text:min-label-width="0.1965in">
          <style:list-level-label-alignment fo:text-align="left" fo:text-indent="-0.1965in" fo:margin-left="2.4549in" fo:line-height="100%" text:label-followed-by="listtab"/>
        </style:list-level-properties>
      </text:list-level-style-number>
      <text:list-level-style-number text:level="6" text:style-name="T1" style:num-suffix="." style:num-format="1">
        <style:list-level-properties text:list-level-position-and-space-mode="label-alignment" text:space-before="2.7493in" text:min-label-width="0.1965in">
          <style:list-level-label-alignment fo:text-align="left" fo:text-indent="-0.1965in" fo:margin-left="2.9458in" fo:line-height="100%" text:label-followed-by="listtab"/>
        </style:list-level-properties>
      </text:list-level-style-number>
      <text:list-level-style-number text:level="7" text:style-name="T1" style:num-suffix="." style:num-format="1">
        <style:list-level-properties text:list-level-position-and-space-mode="label-alignment" text:space-before="3.2403in" text:min-label-width="0.1965in">
          <style:list-level-label-alignment fo:text-align="left" fo:text-indent="-0.1965in" fo:margin-left="3.4368in" fo:line-height="100%" text:label-followed-by="listtab"/>
        </style:list-level-properties>
      </text:list-level-style-number>
      <text:list-level-style-number text:level="8" text:style-name="T1" style:num-suffix="." style:num-format="1">
        <style:list-level-properties text:list-level-position-and-space-mode="label-alignment" text:space-before="3.7313in" text:min-label-width="0.1965in">
          <style:list-level-label-alignment fo:text-align="left" fo:text-indent="-0.1965in" fo:margin-left="3.9278in" fo:line-height="100%" text:label-followed-by="listtab"/>
        </style:list-level-properties>
      </text:list-level-style-number>
      <text:list-level-style-number text:level="9" text:style-name="T1" style:num-suffix="." style:num-format="1">
        <style:list-level-properties text:list-level-position-and-space-mode="label-alignment" text:space-before="4.7132in" text:min-label-width="0.1965in">
          <style:list-level-label-alignment fo:text-align="left" fo:text-indent="-0.1965in" fo:margin-left="4.9097in" fo:line-height="100%" text:label-followed-by="listtab"/>
        </style:list-level-properties>
      </text:list-level-style-number>
    </text:list-style>
    <style:style style:name="T1" style:family="text"/>
    <style:style style:name="T2" style:family="text" style:parent-style-name="Default Paragraph Font">
      <style:text-properties fo:font-size="18pt" fo:color="#FF4000"/>
    </style:style>
    <style:style style:name="T3" style:family="text" style:parent-style-name="Default Paragraph Font">
      <style:text-properties fo:font-size="22pt"/>
    </style:style>
    <style:style style:name="P1" style:family="paragraph" style:parent-style-name="Standard" style:master-page-name="Standard"/>
    <style:style style:name="P2" style:family="paragraph" style:parent-style-name="Table_20_Heading"/>
    <style:style style:name="P3" style:family="paragraph" style:parent-style-name="Table_20_Heading"/>
    <style:style style:name="P4" style:family="paragraph" style:parent-style-name="Table_20_Heading"/>
    <style:style style:name="P5" style:family="paragraph" style:parent-style-name="Table_20_Heading"/>
    <style:style style:name="P6" style:family="paragraph" style:parent-style-name="Table_20_Contents"/>
    <style:style style:name="P7" style:family="paragraph" style:parent-style-name="Table_20_Contents"/>
    <style:style style:name="P8" style:family="paragraph" style:parent-style-name="Table_20_Contents"/>
    <style:style style:name="P9" style:family="paragraph" style:parent-style-name="Table_20_Contents"/>
    <style:style style:name="P10" style:family="paragraph" style:parent-style-name="Table_20_Contents"/>
    <style:style style:name="P11" style:family="paragraph" style:parent-style-name="Table_20_Contents"/>
    <style:style style:name="P12" style:family="paragraph" style:parent-style-name="Table_20_Contents"/>
    <style:style style:name="P13" style:family="paragraph" style:parent-style-name="Table_20_Contents"/>
    <style:style style:name="P14" style:family="paragraph" style:parent-style-name="Table_20_Contents"/>
    <style:style style:name="P15" style:family="paragraph" style:parent-style-name="Table_20_Contents"/>
    <style:style style:name="P16" style:family="paragraph" style:parent-style-name="Table_20_Contents"/>
    <style:style style:name="P17" style:family="paragraph" style:parent-style-name="Table_20_Contents"/>
    <style:style style:name="P18" style:family="paragraph" style:parent-style-name="Table_20_Contents"/>
    <style:style style:name="P19" style:family="paragraph" style:parent-style-name="Table_20_Contents"/>
    <style:style style:name="P20" style:family="paragraph" style:parent-style-name="Table_20_Contents"/>
    <style:style style:name="P21" style:family="paragraph" style:parent-style-name="Table_20_Contents"/>
    <style:style style:name="P22" style:family="paragraph" style:parent-style-name="Table_20_Contents"/>
    <style:style style:name="P23" style:family="paragraph" style:parent-style-name="Table_20_Contents"/>
    <style:style style:name="P24" style:family="paragraph" style:parent-style-name="Table_20_Contents"/>
    <style:style style:name="P25" style:family="paragraph" style:parent-style-name="Table_20_Contents"/>
    <style:style style:name="P26" style:family="paragraph" style:parent-style-name="Standard"/>
    <style:style style:name="P27" style:family="paragraph" style:parent-style-name="Standard"/>
    <style:style style:name="P28" style:family="paragraph" style:parent-style-name="Standard"/>
    <style:style style:name="P29" style:family="paragraph" style:parent-style-name="Standard"/>
    <style:style style:name="P30" style:family="paragraph" style:parent-style-name="Heading_20_3"/>
    <style:style style:name="P31" style:family="paragraph" style:parent-style-name="Heading_20_3"/>
    <style:style style:name="P32" style:family="paragraph" style:parent-style-name="Text_20_body"/>
    <style:style style:name="P33" style:family="paragraph" style:parent-style-name="Text_20_body" style:list-style-name="L0">
      <style:paragraph-properties fo:margin-top="0in" fo:margin-bottom="0in" fo:widows="2" fo:orphans="2" style:tab-stop-distance="1.2506cm"/>
    </style:style>
    <style:style style:name="P34" style:family="paragraph" style:parent-style-name="Text_20_body" style:list-style-name="L0">
      <style:paragraph-properties fo:margin-top="0in" fo:margin-bottom="0in" fo:widows="2" fo:orphans="2" style:tab-stop-distance="1.2506cm"/>
    </style:style>
    <style:style style:name="P35" style:family="paragraph" style:parent-style-name="Text_20_body" style:list-style-name="L0">
      <style:paragraph-properties fo:margin-top="0in" fo:margin-bottom="0in" fo:widows="2" fo:orphans="2" style:tab-stop-distance="1.2506cm"/>
    </style:style>
    <style:style style:name="P36" style:family="paragraph" style:parent-style-name="Text_20_body" style:list-style-name="L0">
      <style:paragraph-properties fo:margin-top="0in" fo:margin-bottom="0in" fo:widows="2" fo:orphans="2" style:tab-stop-distance="1.2506cm"/>
    </style:style>
    <style:style style:name="P37" style:family="paragraph" style:parent-style-name="Text_20_body" style:list-style-name="L0">
      <style:paragraph-properties fo:margin-top="0in" fo:margin-bottom="0in" fo:widows="2" fo:orphans="2" style:tab-stop-distance="1.2506cm"/>
    </style:style>
    <style:style style:name="P38" style:family="paragraph" style:parent-style-name="Text_20_body" style:list-style-name="L0"/>
    <style:style style:name="P39" style:family="paragraph" style:parent-style-name="Standard"/>
    <style:style style:name="Table1" style:family="table">
      <style:table-properties style:width="16.6882cm" table:align="margins"/>
    </style:style>
    <style:style style:name="Table1.c1" style:family="table-column">
      <style:table-column-properties style:column-width="4.4644cm" style:rel-column-width="2531*" style:use-optimal-column-width="false"/>
    </style:style>
    <style:style style:name="Table1.c2" style:family="table-column">
      <style:table-column-properties style:column-width="2.8575cm" style:rel-column-width="1620*" style:use-optimal-column-width="false"/>
    </style:style>
    <style:style style:name="Table1.c3" style:family="table-column">
      <style:table-column-properties style:column-width="4.1275cm" style:rel-column-width="2340*" style:use-optimal-column-width="false"/>
    </style:style>
    <style:style style:name="Table1.c4" style:family="table-column">
      <style:table-column-properties style:column-width="5.2387cm" style:rel-column-width="2970*" style:use-optimal-column-width="false"/>
    </style:style>
    <style:style style:name="Table1.1" style:family="table-row">
      <style:table-row-properties style:min-row-height="0.7461cm" fo:keep-together="always"/>
    </style:style>
    <style:style style:name="Table1.1.1" style:family="table-cell">
      <style:table-cell-properties fo:border="none" fo:padding="0.0494cm" style:vertical-align="middle" style:writing-mode="lr-tb"/>
    </style:style>
    <style:style style:name="Table1.1.2" style:family="table-cell">
      <style:table-cell-properties fo:border="none" fo:padding="0.0494cm" style:vertical-align="middle" style:writing-mode="lr-tb"/>
    </style:style>
    <style:style style:name="Table1.1.3" style:family="table-cell">
      <style:table-cell-properties fo:border="none" fo:padding="0.0494cm" style:vertical-align="middle" style:writing-mode="lr-tb"/>
    </style:style>
    <style:style style:name="Table1.1.4" style:family="table-cell">
      <style:table-cell-properties fo:border="none" fo:padding="0.0494cm" style:vertical-align="middle" style:writing-mode="lr-tb"/>
    </style:style>
    <style:style style:name="Table1.2" style:family="table-row">
      <style:table-row-properties fo:keep-together="always"/>
    </style:style>
    <style:style style:name="Table1.2.5" style:family="table-cell">
      <style:table-cell-properties fo:border="none" fo:padding="0.0494cm" style:vertical-align="middle" style:writing-mode="lr-tb"/>
    </style:style>
    <style:style style:name="Table1.2.6" style:family="table-cell">
      <style:table-cell-properties fo:border="none" fo:padding="0.0494cm" style:vertical-align="middle" style:writing-mode="lr-tb"/>
    </style:style>
    <style:style style:name="Table1.2.7" style:family="table-cell">
      <style:table-cell-properties fo:border="none" fo:padding="0.0494cm" style:vertical-align="middle" style:writing-mode="lr-tb"/>
    </style:style>
    <style:style style:name="Table1.2.8" style:family="table-cell">
      <style:table-cell-properties fo:border="none" fo:padding="0.0494cm" style:vertical-align="middle" style:writing-mode="lr-tb"/>
    </style:style>
    <style:style style:name="Table1.3" style:family="table-row">
      <style:table-row-properties fo:keep-together="always"/>
    </style:style>
    <style:style style:name="Table1.3.9" style:family="table-cell">
      <style:table-cell-properties fo:border="none" fo:padding="0.0494cm" style:vertical-align="middle" style:writing-mode="lr-tb"/>
    </style:style>
    <style:style style:name="Table1.3.10" style:family="table-cell">
      <style:table-cell-properties fo:border="none" fo:padding="0.0494cm" style:vertical-align="middle" style:writing-mode="lr-tb"/>
    </style:style>
    <style:style style:name="Table1.3.11" style:family="table-cell">
      <style:table-cell-properties fo:border="none" fo:padding="0.0494cm" style:vertical-align="middle" style:writing-mode="lr-tb"/>
    </style:style>
    <style:style style:name="Table1.3.12" style:family="table-cell">
      <style:table-cell-properties fo:border="none" fo:padding="0.0494cm" style:vertical-align="middle" style:writing-mode="lr-tb"/>
    </style:style>
    <style:style style:name="Table1.4" style:family="table-row">
      <style:table-row-properties fo:keep-together="always"/>
    </style:style>
    <style:style style:name="Table1.4.13" style:family="table-cell">
      <style:table-cell-properties fo:border="none" fo:padding="0.0494cm" style:vertical-align="middle" style:writing-mode="lr-tb"/>
    </style:style>
    <style:style style:name="Table1.4.14" style:family="table-cell">
      <style:table-cell-properties fo:border="none" fo:padding="0.0494cm" style:vertical-align="middle" style:writing-mode="lr-tb"/>
    </style:style>
    <style:style style:name="Table1.4.15" style:family="table-cell">
      <style:table-cell-properties fo:border="none" fo:padding="0.0494cm" style:vertical-align="middle" style:writing-mode="lr-tb"/>
    </style:style>
    <style:style style:name="Table1.4.16" style:family="table-cell">
      <style:table-cell-properties fo:border="none" fo:padding="0.0494cm" style:vertical-align="middle" style:writing-mode="lr-tb"/>
    </style:style>
    <style:style style:name="Table1.5" style:family="table-row">
      <style:table-row-properties fo:keep-together="always"/>
    </style:style>
    <style:style style:name="Table1.5.17" style:family="table-cell">
      <style:table-cell-properties fo:border="none" fo:padding="0.0494cm" style:vertical-align="middle" style:writing-mode="lr-tb"/>
    </style:style>
    <style:style style:name="Table1.5.18" style:family="table-cell">
      <style:table-cell-properties fo:border="none" fo:padding="0.0494cm" style:vertical-align="middle" style:writing-mode="lr-tb"/>
    </style:style>
    <style:style style:name="Table1.5.19" style:family="table-cell">
      <style:table-cell-properties fo:border="none" fo:padding="0.0494cm" style:vertical-align="middle" style:writing-mode="lr-tb"/>
    </style:style>
    <style:style style:name="Table1.5.20" style:family="table-cell">
      <style:table-cell-properties fo:border="none" fo:padding="0.0494cm" style:vertical-align="middle" style:writing-mode="lr-tb"/>
    </style:style>
    <style:style style:name="Table1.6" style:family="table-row">
      <style:table-row-properties fo:keep-together="always"/>
    </style:style>
    <style:style style:name="Table1.6.21" style:family="table-cell">
      <style:table-cell-properties fo:border="none" fo:padding="0.0494cm" style:vertical-align="middle" style:writing-mode="lr-tb"/>
    </style:style>
    <style:style style:name="Table1.6.22" style:family="table-cell">
      <style:table-cell-properties fo:border="none" fo:padding="0.0494cm" style:vertical-align="middle" style:writing-mode="lr-tb"/>
    </style:style>
    <style:style style:name="Table1.6.23" style:family="table-cell">
      <style:table-cell-properties fo:border="none" fo:padding="0.0494cm" style:vertical-align="middle" style:writing-mode="lr-tb"/>
    </style:style>
    <style:style style:name="Table1.6.24" style:family="table-cell">
      <style:table-cell-properties fo:border="none" fo:padding="0.0494cm" style:vertical-align="middle" style:writing-mode="lr-tb"/>
    </style:style>
  </office:automatic-styles>
  <office:body>
    <office:text>
      <text:section text:style-name="S0" text:name="Section0">
        <text:p text:style-name="P1"><text:span text:style-name="T2">comparison of DBMS tools for student service managemant system</text:span></text:p>
        <table:table table:name="Table1" table:style-name="Table1">
          <table:table-column table:style-name="Table1.c1"/>
          <table:table-column table:style-name="Table1.c2"/>
          <table:table-column table:style-name="Table1.c3"/>
          <table:table-column table:style-name="Table1.c4"/>
          <table:table-row table:style-name="Table1.1">
            <table:table-cell table:style-name="Table1.1.1" office:value-type="string">
              <text:p text:style-name="P2"><text:span text:style-name="Default Paragraph Font">Feature</text:span></text:p>
            </table:table-cell>
            <table:table-cell table:style-name="Table1.1.2" office:value-type="string">
              <text:p text:style-name="P3"><text:span text:style-name="Default Paragraph Font">MySQL</text:span></text:p>
            </table:table-cell>
            <table:table-cell table:style-name="Table1.1.3" office:value-type="string">
              <text:p text:style-name="P4"><text:span text:style-name="Default Paragraph Font">PostgreSQL</text:span></text:p>
            </table:table-cell>
            <table:table-cell table:style-name="Table1.1.4" office:value-type="string">
              <text:p text:style-name="P5"><text:span text:style-name="Default Paragraph Font">SQL Server</text:span></text:p>
            </table:table-cell>
          </table:table-row>
          <table:table-row table:style-name="Table1.2">
            <table:table-cell table:style-name="Table1.2.5" office:value-type="string">
              <text:p text:style-name="P6"><text:span text:style-name="Default Paragraph Font">Cost</text:span></text:p>
            </table:table-cell>
            <table:table-cell table:style-name="Table1.2.6" office:value-type="string">
              <text:p text:style-name="P7"><text:span text:style-name="Default Paragraph Font">Free</text:span></text:p>
            </table:table-cell>
            <table:table-cell table:style-name="Table1.2.7" office:value-type="string">
              <text:p text:style-name="P8"><text:span text:style-name="Default Paragraph Font">Free</text:span></text:p>
            </table:table-cell>
            <table:table-cell table:style-name="Table1.2.8" office:value-type="string">
              <text:p text:style-name="P9"><text:span text:style-name="Default Paragraph Font">Paid</text:span></text:p>
            </table:table-cell>
          </table:table-row>
          <table:table-row table:style-name="Table1.3">
            <table:table-cell table:style-name="Table1.3.9" office:value-type="string">
              <text:p text:style-name="P10"><text:span text:style-name="Default Paragraph Font">Performance</text:span></text:p>
            </table:table-cell>
            <table:table-cell table:style-name="Table1.3.10" office:value-type="string">
              <text:p text:style-name="P11"><text:span text:style-name="Default Paragraph Font">High</text:span></text:p>
            </table:table-cell>
            <table:table-cell table:style-name="Table1.3.11" office:value-type="string">
              <text:p text:style-name="P12"><text:span text:style-name="Default Paragraph Font">High</text:span></text:p>
            </table:table-cell>
            <table:table-cell table:style-name="Table1.3.12" office:value-type="string">
              <text:p text:style-name="P13"><text:span text:style-name="Default Paragraph Font">Very High</text:span></text:p>
            </table:table-cell>
          </table:table-row>
          <table:table-row table:style-name="Table1.4">
            <table:table-cell table:style-name="Table1.4.13" office:value-type="string">
              <text:p text:style-name="P14"><text:span text:style-name="Default Paragraph Font">Scalability</text:span></text:p>
            </table:table-cell>
            <table:table-cell table:style-name="Table1.4.14" office:value-type="string">
              <text:p text:style-name="P15"><text:span text:style-name="Default Paragraph Font">Good</text:span></text:p>
            </table:table-cell>
            <table:table-cell table:style-name="Table1.4.15" office:value-type="string">
              <text:p text:style-name="P16"><text:span text:style-name="Default Paragraph Font">Excellent</text:span></text:p>
            </table:table-cell>
            <table:table-cell table:style-name="Table1.4.16" office:value-type="string">
              <text:p text:style-name="P17"><text:span text:style-name="Default Paragraph Font">Excellent</text:span></text:p>
            </table:table-cell>
          </table:table-row>
          <table:table-row table:style-name="Table1.5">
            <table:table-cell table:style-name="Table1.5.17" office:value-type="string">
              <text:p text:style-name="P18"><text:span text:style-name="Default Paragraph Font">Ease of Use</text:span></text:p>
            </table:table-cell>
            <table:table-cell table:style-name="Table1.5.18" office:value-type="string">
              <text:p text:style-name="P19"><text:span text:style-name="Default Paragraph Font">Easy</text:span></text:p>
            </table:table-cell>
            <table:table-cell table:style-name="Table1.5.19" office:value-type="string">
              <text:p text:style-name="P20"><text:span text:style-name="Default Paragraph Font">Moderate</text:span></text:p>
            </table:table-cell>
            <table:table-cell table:style-name="Table1.5.20" office:value-type="string">
              <text:p text:style-name="P21"><text:span text:style-name="Default Paragraph Font">Easy</text:span></text:p>
            </table:table-cell>
          </table:table-row>
          <table:table-row table:style-name="Table1.6">
            <table:table-cell table:style-name="Table1.6.21" office:value-type="string">
              <text:p text:style-name="P22"><text:span text:style-name="Default Paragraph Font">Compatibility</text:span></text:p>
            </table:table-cell>
            <table:table-cell table:style-name="Table1.6.22" office:value-type="string">
              <text:p text:style-name="P23"><text:span text:style-name="Default Paragraph Font">Excellent</text:span></text:p>
            </table:table-cell>
            <table:table-cell table:style-name="Table1.6.23" office:value-type="string">
              <text:p text:style-name="P24"><text:span text:style-name="Default Paragraph Font">Excellent</text:span></text:p>
            </table:table-cell>
            <table:table-cell table:style-name="Table1.6.24" office:value-type="string">
              <text:p text:style-name="P25"><text:span text:style-name="Default Paragraph Font">Excellent</text:span></text:p>
            </table:table-cell>
          </table:table-row>
        </table:table>
        <text:p text:style-name="P26"><text:span text:style-name="Default Paragraph Font"><text:s/></text:span></text:p>
        <text:p text:style-name="P27"/>
        <text:p text:style-name="P28"/>
        <text:p text:style-name="P29"><text:span text:style-name="T3">Performance</text:span></text:p>
        <text:h text:style-name="P30" text:outline-level="3"><text:span text:style-name="Default Paragraph Font">Recommended RDBMS: MySQL</text:span></text:h>
        <text:h text:style-name="P31" text:outline-level="3"><text:span text:style-name="Default Paragraph Font">Justification</text:span></text:h>
        <text:p text:style-name="P32"><text:span text:style-name="Default Paragraph Font">MySQL is recommended because:</text:span></text:p>
        <text:list xml:id="list57292263" text:style-name="L0" text:continue-numbering="true">
          <text:list-item>
            <text:p text:style-name="P33"><text:span text:style-name="Default Paragraph Font">It is free to acquire and use.<text:s/></text:span></text:p>
          </text:list-item>
          <text:list-item>
            <text:p text:style-name="P34"><text:span text:style-name="Default Paragraph Font">It supports all required database features.<text:s/></text:span></text:p>
          </text:list-item>
          <text:list-item>
            <text:p text:style-name="P35"><text:span text:style-name="Default Paragraph Font">It is easy to install and maintain.<text:s/></text:span></text:p>
          </text:list-item>
          <text:list-item>
            <text:p text:style-name="P36"><text:span text:style-name="Default Paragraph Font">It provides sufficient performance for a college management system.<text:s/></text:span></text:p>
          </text:list-item>
          <text:list-item>
            <text:p text:style-name="P37"><text:span text:style-name="Default Paragraph Font">It has extensive documentation and community support.<text:s/></text:span></text:p>
          </text:list-item>
          <text:list-item>
            <text:p text:style-name="P38"><text:span text:style-name="Default Paragraph Font">It can comfortably manage thousands of student records.</text:span></text:p>
          </text:list-item>
        </text:list>
        <text:p text:style-name="P39"/>
      </text:section>
    </office:text>
  </office:body>
</office:document-content>
</file>

<file path=styles.xml><?xml version="1.0" encoding="utf-8"?>
<office:document-styles xmlns:style="urn:oasis:names:tc:opendocument:xmlns:style:1.0" xmlns:text="urn:oasis:names:tc:opendocument:xmlns:text:1.0" xmlns:fo="urn:oasis:names:tc:opendocument:xmlns:xsl-fo-compatible:1.0" xmlns:xlink="http://www.w3.org/1999/xlink" xmlns:svg="urn:oasis:names:tc:opendocument:xmlns:svg-compatible:1.0" xmlns:table="urn:oasis:names:tc:opendocument:xmlns:table:1.0" xmlns:office="urn:oasis:names:tc:opendocument:xmlns:office:1.0">
  <office:font-face-decls>
    <style:font-face style:name="Times New Roman" svg:font-family="Times New Roman"/>
    <style:font-face style:name="Arial" svg:font-family="Arial"/>
  </office:font-face-decls>
  <office:styles>
    <style:default-style style:family="paragraph">
      <style:paragraph-properties fo:text-align="left" fo:text-indent="0in" fo:margin-left="0in" fo:margin-right="0in" fo:margin-top="0in" fo:margin-bottom="0in" fo:line-height="100%" fo:break-before="auto" style:default-outline-level="0" fo:keep-with-next="auto" fo:keep-together="auto" fo:widows="2" fo:orphans="2" fo:border="none" fo:padding-top="0cm" fo:padding-left="0cm" fo:padding-right="0cm" fo:padding-bottom="0cm" style:tab-stop-distance="1.2506cm" text:number-lines="false"/>
      <style:text-properties fo:font-size="12pt" style:font-name="Times New Roman" style:font-name-complex="Lucida Sans" style:font-name-asian="NSimSun" style:letter-kerning="true" fo:color="#000000"/>
    </style:default-style>
    <style:default-style style:family="table">
      <style:table-properties table:border-model="collapsing" table:align="margins"/>
      <style:text-properties fo:font-size="12pt" style:font-name="Times New Roman" style:font-name-complex="Lucida Sans" style:font-name-asian="NSimSun" style:letter-kerning="true" fo:color="#000000"/>
    </style:default-style>
    <style:style style:name="Default Paragraph Font" style:family="text"/>
    <style:style style:name="Line Number" style:family="text" style:parent-style-name="Default Paragraph Font"/>
    <style:style style:name="Hyperlink" style:family="text">
      <style:text-properties fo:color="#0000FF" style:text-underline-style="solid" style:text-underline-width="auto"/>
    </style:style>
    <style:style style:name="Normal" style:family="paragraph"/>
    <style:style style:name="Standard" style:family="paragraph" style:parent-style-name="Normal"/>
    <style:style style:name="Table_20_Contents" style:family="paragraph" style:parent-style-name="Standard">
      <style:paragraph-properties fo:widows="2" fo:orphans="2" style:tab-stop-distance="1.2506cm" text:number-lines="false"/>
    </style:style>
    <style:style style:name="Table_20_Heading" style:family="paragraph" style:parent-style-name="Table_20_Contents">
      <style:paragraph-properties fo:text-align="center" fo:widows="2" fo:orphans="2" style:tab-stop-distance="1.2506cm" text:number-lines="false"/>
      <style:text-properties fo:font-weight="bold"/>
    </style:style>
    <style:style style:name="Heading" style:family="paragraph" style:parent-style-name="Standard" style:next-style-name="Text_20_body">
      <style:paragraph-properties fo:margin-top="0.1667in" fo:margin-bottom="0.0833in" fo:keep-with-next="always" fo:widows="2" fo:orphans="2" style:tab-stop-distance="1.2506cm"/>
      <style:text-properties fo:font-size="14pt" style:font-name="Arial" style:font-name-complex="Lucida Sans" style:font-name-asian="Microsoft YaHei"/>
    </style:style>
    <style:style style:name="Heading_20_3" style:family="paragraph" style:parent-style-name="Heading" style:next-style-name="Text_20_body">
      <style:paragraph-properties fo:margin-top="0.0972in" fo:margin-bottom="0.0833in" fo:widows="2" fo:orphans="2" style:tab-stop-distance="1.2506cm"/>
      <style:text-properties fo:font-size="14pt" fo:font-weight="bold" style:font-name="Times New Roman" style:font-name-complex="Lucida Sans" style:font-name-asian="NSimSun"/>
    </style:style>
    <style:style style:name="Text_20_body" style:family="paragraph" style:parent-style-name="Standard">
      <style:paragraph-properties fo:margin-top="0in" fo:margin-bottom="0.0972in" fo:line-height="115%" fo:widows="2" fo:orphans="2" style:tab-stop-distance="1.2506cm"/>
    </style:style>
    <text:linenumbering-configuration text:number-lines="false" text:offset="0.5cm" text:num-format="1" text:number-position="left" text:increment="0"/>
  </office:styles>
  <office:automatic-styles>
    <style:page-layout style:name="Mpm0">
      <style:page-layout-properties fo:page-width="8.5in" fo:page-height="11in" style:print-orientation="portrait" fo:margin-top="0.5in" fo:margin-bottom="0.7875in" fo:margin-left="0.7875in" fo:margin-right="0.7875in"/>
      <style:header-style>
        <style:header-footer-properties fo:min-height="0.2875in" fo:margin-left="0in" fo:margin-right="0in" style:dynamic-spacing="false"/>
      </style:header-style>
    </style:page-layout>
    <text:list-style style:name="L0">
      <text:list-level-style-number text:level="1" text:style-name="T1" style:num-suffix="." style:num-format="1">
        <style:list-level-properties text:list-level-position-and-space-mode="label-alignment" text:space-before="0.2944in" text:min-label-width="0.1965in">
          <style:list-level-label-alignment fo:text-align="left" fo:text-indent="-0.1965in" fo:margin-left="0.491in" fo:line-height="100%" text:label-followed-by="listtab"/>
        </style:list-level-properties>
      </text:list-level-style-number>
      <text:list-level-style-number text:level="2" text:style-name="T1" style:num-suffix="." style:num-format="1">
        <style:list-level-properties text:list-level-position-and-space-mode="label-alignment" text:space-before="0.7854in" text:min-label-width="0.1965in">
          <style:list-level-label-alignment fo:text-align="left" fo:text-indent="-0.1965in" fo:margin-left="0.9819in" fo:line-height="100%" text:label-followed-by="listtab"/>
        </style:list-level-properties>
      </text:list-level-style-number>
      <text:list-level-style-number text:level="3" text:style-name="T1" style:num-suffix="." style:num-format="1">
        <style:list-level-properties text:list-level-position-and-space-mode="label-alignment" text:space-before="1.2764in" text:min-label-width="0.1965in">
          <style:list-level-label-alignment fo:text-align="left" fo:text-indent="-0.1965in" fo:margin-left="1.4729in" fo:line-height="100%" text:label-followed-by="listtab"/>
        </style:list-level-properties>
      </text:list-level-style-number>
      <text:list-level-style-number text:level="4" text:style-name="T1" style:num-suffix="." style:num-format="1">
        <style:list-level-properties text:list-level-position-and-space-mode="label-alignment" text:space-before="1.7674in" text:min-label-width="0.1965in">
          <style:list-level-label-alignment fo:text-align="left" fo:text-indent="-0.1965in" fo:margin-left="1.9639in" fo:line-height="100%" text:label-followed-by="listtab"/>
        </style:list-level-properties>
      </text:list-level-style-number>
      <text:list-level-style-number text:level="5" text:style-name="T1" style:num-suffix="." style:num-format="1">
        <style:list-level-properties text:list-level-position-and-space-mode="label-alignment" text:space-before="2.2583in" text:min-label-width="0.1965in">
          <style:list-level-label-alignment fo:text-align="left" fo:text-indent="-0.1965in" fo:margin-left="2.4549in" fo:line-height="100%" text:label-followed-by="listtab"/>
        </style:list-level-properties>
      </text:list-level-style-number>
      <text:list-level-style-number text:level="6" text:style-name="T1" style:num-suffix="." style:num-format="1">
        <style:list-level-properties text:list-level-position-and-space-mode="label-alignment" text:space-before="2.7493in" text:min-label-width="0.1965in">
          <style:list-level-label-alignment fo:text-align="left" fo:text-indent="-0.1965in" fo:margin-left="2.9458in" fo:line-height="100%" text:label-followed-by="listtab"/>
        </style:list-level-properties>
      </text:list-level-style-number>
      <text:list-level-style-number text:level="7" text:style-name="T1" style:num-suffix="." style:num-format="1">
        <style:list-level-properties text:list-level-position-and-space-mode="label-alignment" text:space-before="3.2403in" text:min-label-width="0.1965in">
          <style:list-level-label-alignment fo:text-align="left" fo:text-indent="-0.1965in" fo:margin-left="3.4368in" fo:line-height="100%" text:label-followed-by="listtab"/>
        </style:list-level-properties>
      </text:list-level-style-number>
      <text:list-level-style-number text:level="8" text:style-name="T1" style:num-suffix="." style:num-format="1">
        <style:list-level-properties text:list-level-position-and-space-mode="label-alignment" text:space-before="3.7313in" text:min-label-width="0.1965in">
          <style:list-level-label-alignment fo:text-align="left" fo:text-indent="-0.1965in" fo:margin-left="3.9278in" fo:line-height="100%" text:label-followed-by="listtab"/>
        </style:list-level-properties>
      </text:list-level-style-number>
      <text:list-level-style-number text:level="9" text:style-name="T1" style:num-suffix="." style:num-format="1">
        <style:list-level-properties text:list-level-position-and-space-mode="label-alignment" text:space-before="4.7132in" text:min-label-width="0.1965in">
          <style:list-level-label-alignment fo:text-align="left" fo:text-indent="-0.1965in" fo:margin-left="4.9097in" fo:line-height="100%" text:label-followed-by="listtab"/>
        </style:list-level-properties>
      </text:list-level-style-number>
    </text:list-style>
  </office:automatic-styles>
  <office:master-styles>
    <style:master-page style:name="Standard" style:page-layout-name="Mpm0"/>
  </office:master-styles>
</office:document-styles>
</file>

<file path=meta.xml><?xml version="1.0" encoding="utf-8"?>
<office:document-meta xmlns:style="urn:oasis:names:tc:opendocument:xmlns:style:1.0" xmlns:text="urn:oasis:names:tc:opendocument:xmlns:text:1.0" xmlns:fo="urn:oasis:names:tc:opendocument:xmlns:xsl-fo-compatible:1.0" xmlns:svg="urn:oasis:names:tc:opendocument:xmlns:svg-compatible:1.0" xmlns:draw="urn:oasis:names:tc:opendocument:xmlns:drawing:1.0" xmlns:xlink="http://www.w3.org/1999/xlink" xmlns:oow="http://openoffice.org/2004/writer" xmlns:table="urn:oasis:names:tc:opendocument:xmlns:table:1.0" xmlns:office="urn:oasis:names:tc:opendocument:xmlns:office:1.0" xmlns:dc="http://purl.org/dc/elements/1.1/" xmlns:meta="urn:oasis:names:tc:opendocument:xmlns:meta:1.0">
  <office:meta>
    <meta:creation-date>2026-06-12T08:45:41Z</meta:creation-date>
    <dc:creator>DAKTARI01</dc:creator>
    <dc:date>2026-06-12T11:56:04Z</dc:date>
    <meta:editing-cycles>1</meta:editing-cycles>
    <meta:generator>DevExpress Office File API/25.1.3.0</meta:generator>
  </office:meta>
</office:document-meta>
</file>